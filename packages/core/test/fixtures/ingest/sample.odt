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Project Plan</text:h>
      <text:p>Intro paragraph about the project.</text:p>
      <text:h text:outline-level="2">Goals</text:h>
      <text:p>Deliver the parsers.</text:p>
    </office:text>
  </office:body>
</office:document-content>
</file>